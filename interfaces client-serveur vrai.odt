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margin-left="0cm" fo:margin-right="0cm" fo:text-indent="0cm" style:auto-text-indent="false"/>
      <style:text-properties officeooo:rsid="00008398" officeooo:paragraph-rsid="00008398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officeooo:rsid="00008398" officeooo:paragraph-rsid="00008398"/>
    </style:style>
    <style:style style:name="P4" style:family="paragraph" style:parent-style-name="Standard">
      <style:text-properties officeooo:paragraph-rsid="00008398"/>
    </style:style>
    <style:style style:name="P5" style:family="paragraph" style:parent-style-name="Standard">
      <style:text-properties officeooo:rsid="00008398" officeooo:paragraph-rsid="00008398"/>
    </style:style>
    <style:style style:name="T1" style:family="text">
      <style:text-properties officeooo:rsid="000083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GE ACCUEIL</text:p>
      <text:p text:style-name="Standard">GET php/request.php/<text:span text:style-name="T1">stats</text:span>/station<text:span text:style-name="T1">s</text:span> <text:s/>#renvoie le nombre <text:span text:style-name="T1">total</text:span> de station de recharge </text:p>
      <text:p text:style-name="P4">GET php/request.php/<text:span text:style-name="T1">stats</text:span>/point #renvoie le nombre <text:span text:style-name="T1">total</text:span> de points de charge </text:p>
      <text:p text:style-name="P4">GET php/request.php/<text:span text:style-name="T1">stats</text:span>/<text:span text:style-name="T1">top-departement</text:span> #renvoie le nom du département le mieux équipé</text:p>
      <text:p text:style-name="Standard"/>
      <text:p text:style-name="Standard">PAGE VISUALISATION</text:p>
      <text:p text:style-name="P5">GET php/request.php/visu/points?dep=&amp;types=&amp;limit= #Renvoie les informations des prises, filtré par département et type de prise (pour la carte) avec un nombre limite de données renvoyé</text:p>
      <text:p text:style-name="Standard">GET php/request.php/<text:span text:style-name="T1">visu/points?dep=&amp;types= #Renvoie les coordonnées des stations pour la carte (filtré par type et par département comme le tableau)</text:span></text:p>
      <text:p text:style-name="P5">GET php/request.php/prise/get?id_prise= # récupère toute les informations d’une prise (pour les envoyer à la page modification</text:p>
      <text:p text:style-name="P4">DELETE php/request.php/<text:span text:style-name="T1">prise/supprimer?id_prise=</text:span> #supprime la ligne ayant l’id ….</text:p>
      <text:p text:style-name="Standard"/>
      <text:p text:style-name="Standard">PAGE STATISTIQUE </text:p>
      <text:p text:style-name="Standard">GET <text:s/>php/request.php/s<text:span text:style-name="T1">tatistique/rep_implantation?departement= # renvoie le total des stations par </text:span><text:s/><text:span text:style-name="T1">type d’implantation</text:span></text:p>
      <text:p text:style-name="P5">GET php/request.php/statistique/rep_type?departement= #renvoie le total des stations qui possède une prise d’un certain type</text:p>
      <text:p text:style-name="P4"><text:s/>GET <text:s/>php/request.php/ <text:span text:style-name="T1">statistique/rep_puissance?departement</text:span> #Renvoie <text:span text:style-name="T1">le total des stations qui possède une prise d’un certain type</text:span></text:p>
      <text:p text:style-name="P4">GET php/request.php/<text:span text:style-name="T1">statistique/nb_point_charge?departement= # renvoie le total des stations par nombre de point de charge</text:span></text:p>
      <text:p text:style-name="Standard"/>
      <text:p text:style-name="Standard">PAGE CLUSTER</text:p>
      <text:list xml:id="list1717793616" text:style-name="WWNum1">
        <text:list-header>
          <text:p text:style-name="P2">GET php/request.php/predict/all #calcule plusieurs points de charge pour les faire apparaître sur la carte</text:p>
        </text:list-header>
      </text:list>
      <text:p text:style-name="P3"/>
      <text:p text:style-name="P3">GET php/request.php/predict/point?longitude=&amp;latitude= #renvoie le numéro du cluster du point</text:p>
      <text:p text:style-name="Standard"/>
      <text:p text:style-name="Standard"/>
      <text:p text:style-name="Standard"><text:soft-page-break/></text:p>
      <text:p text:style-name="Standard">PAGE PUISSANCE </text:p>
      <text:list xml:id="list91336705290389" text:continue-numbering="true" text:style-name="WWNum1">
        <text:list-item>
          <text:p text:style-name="P1">Pour utiliser le script python, soit on le transforme en API donc il faudrait le stocker dans une autre machine, soit on l’exécute côté serveur -&gt; à voir si on peut le <text:s/>faire sur nos serveurs ? Sinon existe-t-il une autre méthode ? <text:s/></text:p>
        </text:list-item>
      </text:list>
      <text:p text:style-name="List_20_Paragraph"/>
      <text:p text:style-name="Standard">PAGE AJOUT</text:p>
      <text:p text:style-name="P5">POST php/request.php/ajouter #ajoute une prise à la base de donnée</text:p>
      <text:p text:style-name="P5"/>
      <text:p text:style-name="Standard">PAGE MODIFICATION</text:p>
      <text:p text:style-name="P5">POST php/request.php/prise/modifier # modifie les informations d’une prise</text:p>
      <text:p text:style-name="Standard"/>
      <text:p text:style-name="Standard"/>
      <text:p text:style-name="P5">à voir si c’est utilisé php/request.php/departement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2pt" fo:language="fr" fo:country="FR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fr" fo:country="FR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tion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itre_20_2_20_Car" style:display-name="Titre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3_20_Car" style:display-name="Titre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re_20_8_20_Car" style:display-name="Titre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re_20_9_20_Car" style:display-name="Titre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re_20_Car" style:display-name="Titre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aroline FORNER (A3_BREST)</meta:initial-creator>
    <meta:editing-cycles>2</meta:editing-cycles>
    <meta:creation-date>2026-06-16T07:23:00</meta:creation-date>
    <dc:date>2026-06-19T09:13:03.556000000</dc:date>
    <meta:editing-duration>PT2H20M13S</meta:editing-duration>
    <meta:generator>LibreOffice/7.4.0.3$Windows_X86_64 LibreOffice_project/f85e47c08ddd19c015c0114a68350214f7066f5a</meta:generator>
    <meta:document-statistic meta:table-count="0" meta:image-count="0" meta:object-count="0" meta:page-count="2" meta:paragraph-count="24" meta:word-count="257" meta:character-count="2013" meta:non-whitespace-character-count="1770"/>
    <meta:user-defined meta:name="AppVersion">16.0000</meta:user-defined>
    <meta:template xlink:type="simple" xlink:actuate="onRequest" xlink:title="Normal.dotm" xlink:href=""/>
  </office:meta>
</office:document-meta>
</file>